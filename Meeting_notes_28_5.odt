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Normal" style:family="paragraph">
      <style:text-properties fo:language="en" fo:country="GB"/>
    </style:style>
  </office:automatic-styles>
  <office:body>
    <office:text text:use-soft-page-breaks="true">
      <text:p text:style-name="P1">Meeting notes 29.5.2026 12.00</text:p>
      <text:p text:style-name="Normal">Present: Brandon, Anders, María</text:p>
      <text:p text:style-name="Normal"/>
      <text:list text:style-name="LFO1" text:continue-numbering="true">
        <text:list-item>
          <text:p text:style-name="P2">Suggestion to improve communication systems and implement a team lead for the project.</text:p>
        </text:list-item>
      </text:list>
      <text:p text:style-name="Normal"/>
      <text:p text:style-name="Normal"/>
      <text:p text:style-name="Normal">TO DO:</text:p>
      <text:list text:style-name="LFO1" text:continue-numbering="true">
        <text:list-item>
          <text:p text:style-name="P3">Define the logic of the game, game mechanics.<text:s/></text:p>
        </text:list-item>
        <text:list-item>
          <text:p text:style-name="P4">Create a prototype to present to Piotr.<text:s/></text:p>
        </text:list-item>
        <text:list-item>
          <text:p text:style-name="P5">Agree on a time for the presentation.</text:p>
        </text:list-item>
        <text:list-item>
          <text:p text:style-name="P6">Every team member can make a proposal for the game logic.</text:p>
        </text:list-item>
        <text:list-item>
          <text:p text:style-name="P7">Create schedules<text:s/></text:p>
        </text:list-item>
      </text:list>
      <text:p text:style-name="Normal"/>
      <text:p text:style-name="Normal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U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 fo:language="en" fo:country="US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 fo:language="en" fo:country="U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 fo:language="en" fo:country="U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 fo:language="en" fo:country="U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 fo:language="en" fo:country="U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en" fo:country="U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en" fo:country="US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en" fo:country="U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 fo:language="en" fo:country="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andon Bosquez</meta:initial-creator>
    <dc:creator>Brandon Bosquez</dc:creator>
    <meta:creation-date>2026-05-29T09:06:00Z</meta:creation-date>
    <dc:date>2026-05-29T10:16:00Z</dc:date>
    <meta:template xlink:href="Normal" xlink:type="simple"/>
    <meta:editing-cycles>1</meta:editing-cycles>
    <meta:editing-duration>PT4200S</meta:editing-duration>
    <meta:document-statistic meta:page-count="1" meta:paragraph-count="1" meta:word-count="54" meta:character-count="363" meta:row-count="2" meta:non-whitespace-character-count="310"/>
  </office:meta>
</office:document-meta>
</file>